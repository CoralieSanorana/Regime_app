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117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117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11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number-columns-repeated="16376" table:default-cell-style-name="ce2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ODOLIST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Qui ?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Restant a faire</text:p>
          </table:table-cell>
          <table:table-cell table:style-name="ce3" office:value-type="string" calcext:value-type="string">
            <text:p>Restant (mn)</text:p>
          </table:table-cell>
          <table:table-cell table:style-name="ce3" office:value-type="string" calcext:value-type="string">
            <text:p>Avancement</text:p>
          </table:table-cell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base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Creation de la base de donnnees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]/([.F5]+[.G5]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data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Insertion des donnees de test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]/([.F6]+[.G6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Style &amp; template</text:p>
          </table:table-cell>
          <table:table-cell office:value-type="string" calcext:value-type="string">
            <text:p>Prendre un template de base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8]/([.F8]+[.G8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pier le dossier de base codeigniter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0]/([.F10]+[.G10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Database.ph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r avec la base de donne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1]/([.F11]+[.G11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user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3]/([.F13]+[.G13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user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4]/([.F14]+[.G14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6]/([.F16]+[.G16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7]/([.F17]+[.G17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9]/([.F19]+[.G19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0]/([.F20]+[.G20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2]/([.F22]+[.G22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3]/([.F23]+[.G23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codes_porte_monnaie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5]/([.F25]+[.G25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codes_porte_monnaie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6]/([.F26]+[.G26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sing_up.ph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8]/([.F28]+[.G28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inserer un nouvea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9]/([.F29]+[.G29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addUser() + redirection</text:p>
          </table:table-cell>
          <table:table-cell office:value-type="string" calcext:value-type="string">
            <text:p>apres inscription reussi, rediriger vers page login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0]/([.F30]+[.G30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ing_in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2]/([.F32]+[.G32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la connection d’un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3]/([.F33]+[.G33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Login() + redirection</text:p>
          </table:table-cell>
          <table:table-cell office:value-type="string" calcext:value-type="string">
            <text:p>apres login reussi, rediriger vers dashboard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4]/([.F34]+[.G34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créer barre de navigation commun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6]/([.F36]+[.G36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réer le footer commun, signature du projet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7]/([.F37]+[.G37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solde de son porte monnai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9]/([.F39]+[.G39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poids actuel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0]/([.F40]+[.G40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la duree restant du regime choisi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1]/([.F41]+[.G41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du user connecter</text:p>
          </table:table-cell>
          <table:table-cell office:value-type="string" calcext:value-type="string">
            <text:p>Afficher les informations du user connect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3]/([.F43]+[.G43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fomulaire update</text:p>
          </table:table-cell>
          <table:table-cell office:value-type="string" calcext:value-type="string">
            <text:p>créer un formulaire pour modifier les informations du user</text:p>
          </table:table-cell>
          <table:table-cell office:value-type="float" office:value="12" calcext:value-type="float">
            <text:p>1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4]/([.F44]+[.G44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pour update les informations d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5]/([.F45]+[.G45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Afficher le IMC du user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6]/([.F46]+[.G46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objectifs disponnibles + choix du us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8]/([.F48]+[.G48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Champ pour saisir le poids cible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9]/([.F49]+[.G49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redirection</text:p>
          </table:table-cell>
          <table:table-cell office:value-type="string" calcext:value-type="string">
            <text:p>Bouton ‘Voir suggestion de regimes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0]/([.F50]+[.G50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regimes adequat selon le choix du user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2]/([.F52]+[.G52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Acheter le regime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3]/([.F53]+[.G53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acheter_Regime()</text:p>
          </table:table-cell>
          <table:table-cell office:value-type="string" calcext:value-type="string">
            <text:p>verifie si solde suffisant &amp; addAchat(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4]/([.F54]+[.G54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 regime en cours (details + jours restant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6]/([.F56]+[.G56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activites sportives adequat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7]/([.F57]+[.G57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Formulaire de saisi de <text:s/>code de recharg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9]/([.F59]+[.G59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historiques de transaction de son porte monnaie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0]/([.F60]+[.G60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opportunites du Gol + son prix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2]/([.F62]+[.G62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Obtenir Gold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3]/([.F63]+[.G63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/>
          <table:table-cell office:value-type="string" calcext:value-type="string">
            <text:p>obtenir_Gold()</text:p>
          </table:table-cell>
          <table:table-cell office:value-type="string" calcext:value-type="string">
            <text:p>verifie si solde suffisant &amp; valider ‘Obtenir Gold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4]/([.F64]+[.G64])" office:value-type="string" office:string-value="" calcext:value-type="error">
            <text:p>#DIV/0 !</text:p>
          </table:table-cell>
          <table:table-cell table:number-columns-repeated="16376"/>
        </table:table-row>
        <table:table-row table:style-name="ro1" table:number-rows-repeated="5">
          <table:table-cell table:number-columns-repeated="7"/>
          <table:table-cell table:style-name="ce5"/>
          <table:table-cell table:number-columns-repeated="16376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e dynamique_Feuille1_1" table:style-name="ta1">
        <table:table-column table:style-name="co5" table:default-cell-style-name="ce8"/>
        <table:table-column table:style-name="co5" table:default-cell-style-name="ce12"/>
        <table:table-row table:style-name="ro1">
          <table:table-cell table:style-name="ce6" office:value-type="string" calcext:value-type="string">
            <text:p>Qui ?</text:p>
          </table:table-cell>
          <table:table-cell table:style-name="ce10" office:value-type="string" calcext:value-type="string">
            <text:p>Somme - Estimation</text:p>
          </table:table-cell>
        </table:table-row>
        <table:table-row table:style-name="ro1">
          <table:table-cell table:style-name="ce7" office:value-type="string" calcext:value-type="string">
            <text:p>Coralie</text:p>
          </table:table-cell>
          <table:table-cell table:style-name="ce11" office:value-type="float" office:value="130" calcext:value-type="float">
            <text:p>130,0</text:p>
          </table:table-cell>
        </table:table-row>
        <table:table-row table:style-name="ro1">
          <table:table-cell office:value-type="string" calcext:value-type="string">
            <text:p>Funaki</text:p>
          </table:table-cell>
          <table:table-cell office:value-type="float" office:value="140" calcext:value-type="float">
            <text:p>140,0</text:p>
          </table:table-cell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float" office:value="136" calcext:value-type="float">
            <text:p>136,0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13"/>
        </table:table-row>
        <table:table-row table:style-name="ro1">
          <table:table-cell table:style-name="ce9" office:value-type="string" calcext:value-type="string">
            <text:p>Total Résultat</text:p>
          </table:table-cell>
          <table:table-cell table:style-name="ce14" office:value-type="float" office:value="406" calcext:value-type="float">
            <text:p>406,0</text:p>
          </table:table-cell>
        </table:table-row>
      </table:table>
      <table:named-expressions/>
      <table:database-ranges>
        <table:database-range table:name="__Anonymous_Sheet_DB__0" table:target-range-address="Feuille1.A3:Feuille1.H64"/>
      </table:database-ranges>
      <table:data-pilot-tables>
        <table:data-pilot-table table:name="DataPilot1" table:application-data="" table:target-range-address="'Table dynamique_Feuille1_1'.A1:'Table dynamique_Feuille1_1'.B6" table:buttons="'Table dynamique_Feuille1_1'.A1" table:show-filter-button="false" table:drill-down-on-double-click="false">
          <table:source-cell-range table:cell-range-address="Feuille1.A3:Feuille1.H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 ?" table:orientation="row" table:used-hierarchy="0" table:function="auto">
            <table:data-pilot-level table:show-empty="false" calcext:repeat-item-labels="false">
              <table:data-pilot-members>
                <table:data-pilot-member table:name="Coralie" table:display="true" table:show-details="true"/>
                <table:data-pilot-member table:name="Funaki" table:display="true" table:show-details="true"/>
                <table:data-pilot-member table:name="Jean Pier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5:48:52.43378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5:48:52.844216900</meta:creation-date>
    <meta:editing-duration>PT8M48S</meta:editing-duration>
    <meta:editing-cycles>2</meta:editing-cycles>
    <meta:generator>LibreOffice/26.2.1.2$Windows_X86_64 LibreOffice_project/620$Build-2</meta:generator>
    <dc:date>2026-05-06T17:11:38.330561100</dc:date>
    <meta:document-statistic meta:table-count="2" meta:cell-count="361" meta:object-count="0"/>
  </office:meta>
</office:document-meta>
</file>